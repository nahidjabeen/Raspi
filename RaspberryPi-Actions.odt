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/26/26</text:p>
      <text:p text:style-name="P1"/>
      <text:p text:style-name="P1">Raspberry pi IP: <text:s/>192.168.0.143</text:p>
      <text:p text:style-name="P1">Windows IP: <text:s/>192.168.0.246</text:p>
      <text:p text:style-name="P1"/>
      <text:p text:style-name="Standard"/>
      <text:p text:style-name="P2"/>
      <text:p text:style-name="Standard"/>
      <text:p text:style-name="Standard"><text:span text:style-name="T1">Step 1: </text:span><text:span text:style-name="T3">Windows Powershell </text:span></text:p>
      <text:p text:style-name="Standard"><text:span text:style-name="T3"/></text:p>
      <text:p text:style-name="Standard">PS C:\Users\nahid&gt; ping 192.168.0.143</text:p>
      <text:p text:style-name="Standard"/>
      <text:p text:style-name="Standard">Pinging 192.168.0.143 with 32 bytes of data:</text:p>
      <text:p text:style-name="Standard">Reply from 192.168.0.143: bytes=32 time=8ms TTL=64</text:p>
      <text:p text:style-name="Standard">Reply from 192.168.0.143: bytes=32 time=11ms TTL=64</text:p>
      <text:p text:style-name="Standard"/>
      <text:p text:style-name="Standard"><text:span text:style-name="T1">Step 2: </text:span><text:span text:style-name="T3">Windows Powershell </text:span></text:p>
      <text:p text:style-name="Standard"><text:span text:style-name="T1"/></text:p>
      <text:p text:style-name="Standard">PS C:\Users\nahid&gt; Test-NetConnection 192.168.0.143 -Port 22</text:p>
      <text:p text:style-name="Standard">WARNING: TCP connect to (192.168.0.143 : 22) failed</text:p>
      <text:p text:style-name="Standard"/>
      <text:p text:style-name="Standard"/>
      <text:p text:style-name="Standard">ComputerName <text:s text:c="10"/>: 192.168.0.143</text:p>
      <text:p text:style-name="Standard">RemoteAddress <text:s text:c="9"/>: 192.168.0.143</text:p>
      <text:p text:style-name="Standard">RemotePort <text:s text:c="12"/>: 22</text:p>
      <text:p text:style-name="Standard">InterfaceAlias <text:s text:c="8"/>: Wi-Fi</text:p>
      <text:p text:style-name="Standard">SourceAddress <text:s text:c="9"/>: 192.168.0.246</text:p>
      <text:p text:style-name="Standard">PingSucceeded <text:s text:c="9"/>: True</text:p>
      <text:p text:style-name="Standard">PingReplyDetails (RTT) : 8 ms</text:p>
      <text:p text:style-name="Standard">TcpTestSucceeded <text:s text:c="6"/>: <text:span text:style-name="T1">False</text:span></text:p>
      <text:p text:style-name="Standard"/>
      <text:p text:style-name="P2"/>
      <text:p text:style-name="P2"/>
      <text:p text:style-name="Standard"><text:span text:style-name="T1">Step 3:</text:span> <text:span text:style-name="T3">In Raspberry Pi5</text:span></text:p>
      <text:p text:style-name="Standard"/>
      <text:p text:style-name="Standard">Enable ssh in Raspberry Pi5</text:p>
      <text:p text:style-name="Standard"/>
      <text:p text:style-name="P1">sudo systemctl status ssh</text:p>
      <text:p text:style-name="Standard"/>
      <text:p text:style-name="Standard">not active, says 'dead'</text:p>
      <text:p text:style-name="Standard"/>
      <text:p text:style-name="P1">sudo systemctl enable ssh</text:p>
      <text:p text:style-name="P1">sudo systemctl start ssh</text:p>
      <text:p text:style-name="Standard"/>
      <text:p text:style-name="P1">Step 4: Windows Powershell</text:p>
      <text:p text:style-name="Standard"/>
      <text:p text:style-name="Standard">PS C:\Users\nahid&gt; Test-NetConnection 192.168.0.143 -Port 22</text:p>
      <text:p text:style-name="Standard"/>
      <text:p text:style-name="Standard"/>
      <text:p text:style-name="Standard">ComputerName <text:s text:c="4"/>: 192.168.0.143</text:p>
      <text:p text:style-name="Standard">RemoteAddress <text:s text:c="3"/>: 192.168.0.143</text:p>
      <text:p text:style-name="Standard">RemotePort <text:s text:c="6"/>: 22</text:p>
      <text:p text:style-name="Standard"><text:soft-page-break/>InterfaceAlias <text:s text:c="2"/>: Wi-Fi</text:p>
      <text:p text:style-name="Standard">SourceAddress <text:s text:c="3"/>: 192.168.0.246</text:p>
      <text:p text:style-name="Standard">TcpTestSucceeded : <text:span text:style-name="T1">True</text:span></text:p>
      <text:p text:style-name="Standard"/>
      <text:p text:style-name="Standard"/>
      <text:p text:style-name="Standard"><text:span text:style-name="T1">Step 4 thru Step 7: </text:span>Windows Powershell </text:p>
      <text:p text:style-name="Standard"/>
      <text:p text:style-name="Standard">PS C:\Users\nahid&gt; ssh nahid@192.168.0.143</text:p>
      <text:p text:style-name="Standard">The authenticity of host '192.168.0.143 (192.168.0.143)' can't be established.</text:p>
      <text:p text:style-name="Standard">ED25519 key fingerprint is SHA256:8m5Tk16d1nZ7DrmG8XOR8pJcdVN3P9BvrEXDiu1aHiI.</text:p>
      <text:p text:style-name="Standard">This key is not known by any other names.</text:p>
      <text:p text:style-name="Standard">Are you sure you want to continue connecting (yes/no/[fingerprint])? yes</text:p>
      <text:p text:style-name="Standard">Warning: Permanently added '192.168.0.143' (ED25519) to the list of known hosts.</text:p>
      <text:p text:style-name="Standard">nahid@192.168.0.143's password:mou**shi</text:p>
      <text:p text:style-name="Standard">Linux raspberrypi 6.12.47+rpt-rpi-2712 #1 SMP PREEMPT Debian 1:6.12.47-1+rpt1~bookworm (2025-09-16) aarch64</text:p>
      <text:p text:style-name="Standard"/>
      <text:p text:style-name="Standard">The programs included with the Debian GNU/Linux system are free software;</text:p>
      <text:p text:style-name="Standard">the exact distribution terms for each program are described in the</text:p>
      <text:p text:style-name="Standard">individual files in /usr/share/doc/*/copyright.</text:p>
      <text:p text:style-name="Standard"/>
      <text:p text:style-name="Standard">Debian GNU/Linux comes with ABSOLUTELY NO WARRANTY, to the extent</text:p>
      <text:p text:style-name="Standard">permitted by applicable law.</text:p>
      <text:p text:style-name="Standard">Last login: Sun Dec 14 21:20:40 2025</text:p>
      <text:p text:style-name="Standard">nahid@raspberrypi:~ $</text:p>
      <text:p text:style-name="Standard"/>
      <text:p text:style-name="Standard">nahid@raspberrypi:~ $ ls</text:p>
      <text:p text:style-name="Standard">Bookshelf <text:s/>Documents <text:s/>gstshark_2025-12-14_20:33:14 <text:s/>hailort.log <text:s/>Pictures <text:s/>rpdiags.txt <text:s/>Videos</text:p>
      <text:p text:style-name="Standard">Desktop <text:s text:c="3"/>Downloads <text:s/>hailo-rpi5-examples <text:s text:c="10"/>Music <text:s text:c="7"/>Public <text:s text:c="3"/>Templates</text:p>
      <text:p text:style-name="Standard">nahid@raspberrypi:~ $</text:p>
      <text:p text:style-name="P3"/>
      <text:p text:style-name="P3"/>
      <text:p text:style-name="Standard"/>
      <text:p text:style-name="Standard"><text:span text:style-name="T1">Step 8: Optional</text:span></text:p>
      <text:p text:style-name="Standard"><text:span text:style-name="T1"/></text:p>
      <text:p text:style-name="Standard">Created 'config' file in: C:\Users\nahid\.ssh</text:p>
      <text:p text:style-name="Standard"/>
      <text:p text:style-name="Standard">Host rpi5</text:p>
      <text:p text:style-name="Standard"><text:s text:c="4"/>HostName 192.168.0.143</text:p>
      <text:p text:style-name="Standard"><text:s text:c="4"/>User nahid</text:p>
      <text:p text:style-name="Standard"/>
      <text:p text:style-name="Standard">Use config file</text:p>
      <text:p text:style-name="Standard"/>
      <text:p text:style-name="Standard">PS C:\Users\nahid&gt; ssh rpi5</text:p>
      <text:p text:style-name="Standard">nahid@192.168.0.143's password:</text:p>
      <text:p text:style-name="Standard">Linux raspberrypi 6.12.47+rpt-rpi-2712 #1 SMP PREEMPT Debian 1:6.12.47-1+rpt1~bookworm (2025-09-16) aarch64</text:p>
      <text:p text:style-name="Standard"/>
      <text:p text:style-name="Standard">The programs included with the Debian GNU/Linux system are free software;</text:p>
      <text:p text:style-name="Standard">the exact distribution terms for each program are described in the</text:p>
      <text:p text:style-name="Standard">individual files in /usr/share/doc/*/copyright.</text:p>
      <text:p text:style-name="Standard"/>
      <text:p text:style-name="Standard"><text:soft-page-break/>Debian GNU/Linux comes with ABSOLUTELY NO WARRANTY, to the extent</text:p>
      <text:p text:style-name="Standard">permitted by applicable law.</text:p>
      <text:p text:style-name="Standard">Last login: Fri Jun 26 12:53:54 2026 from 192.168.0.246</text:p>
      <text:p text:style-name="Standard"/>
      <text:p text:style-name="P1">Step 9: Optional</text:p>
      <text:p text:style-name="Standard"/>
      <text:p text:style-name="Standard">ssh-keygen</text:p>
      <text:p text:style-name="Standard"/>
      <text:p text:style-name="Standard">nj-key was generated. Did not use the command ye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3S</meta:editing-duration>
    <meta:editing-cycles>19</meta:editing-cycles>
    <meta:generator>OpenOffice/4.1.15$Win32 OpenOffice.org_project/4115m2$Build-9813</meta:generator>
    <dc:date>2026-06-26T13:31:00.48</dc:date>
    <dc:creator>Nahid Jabeen</dc:creator>
    <meta:document-statistic meta:table-count="0" meta:image-count="0" meta:object-count="0" meta:page-count="3" meta:paragraph-count="71" meta:word-count="362" meta:character-count="2903"/>
    <meta:user-defined meta:name="Info 1"/>
    <meta:user-defined meta:name="Info 2"/>
    <meta:user-defined meta:name="Info 3"/>
    <meta:user-defined meta:name="Info 4"/>
  </office:meta>
</office:document-meta>
</file>